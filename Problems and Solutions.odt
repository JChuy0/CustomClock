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68021" officeooo:paragraph-rsid="00168021"/>
    </style:style>
    <style:style style:name="P2" style:family="paragraph" style:parent-style-name="Standard">
      <style:text-properties fo:font-weight="bold" officeooo:rsid="00281011" officeooo:paragraph-rsid="00281011" style:font-weight-asian="bold" style:font-weight-complex="bold"/>
    </style:style>
    <style:style style:name="P3" style:family="paragraph" style:parent-style-name="Standard">
      <style:text-properties officeooo:rsid="00173863" officeooo:paragraph-rsid="00173863"/>
    </style:style>
    <style:style style:name="P4" style:family="paragraph" style:parent-style-name="Standard">
      <style:text-properties officeooo:rsid="001ca5ce" officeooo:paragraph-rsid="001b15c1"/>
    </style:style>
    <style:style style:name="P5" style:family="paragraph" style:parent-style-name="Standard">
      <style:text-properties officeooo:rsid="001ca5ce" officeooo:paragraph-rsid="001ca5ce"/>
    </style:style>
    <style:style style:name="P6" style:family="paragraph" style:parent-style-name="Standard">
      <style:text-properties officeooo:rsid="0026a410" officeooo:paragraph-rsid="0026a410"/>
    </style:style>
    <style:style style:name="P7" style:family="paragraph" style:parent-style-name="Standard">
      <style:paragraph-properties fo:break-before="page"/>
      <style:text-properties officeooo:rsid="001ca5ce" officeooo:paragraph-rsid="001ca5ce"/>
    </style:style>
    <style:style style:name="P8" style:family="paragraph" style:parent-style-name="Standard">
      <style:text-properties officeooo:rsid="00281011" officeooo:paragraph-rsid="00281011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81011" officeooo:paragraph-rsid="00281011" style:font-weight-asian="bold" style:font-weight-complex="bold"/>
    </style:style>
    <style:style style:name="P10" style:family="paragraph" style:parent-style-name="Standard">
      <style:text-properties officeooo:paragraph-rsid="00281011"/>
    </style:style>
    <style:style style:name="P11" style:family="paragraph" style:parent-style-name="Standard">
      <style:text-properties officeooo:rsid="00216530" officeooo:paragraph-rsid="00281011"/>
    </style:style>
    <style:style style:name="P12" style:family="paragraph" style:parent-style-name="Standard">
      <style:text-properties officeooo:rsid="00173863" officeooo:paragraph-rsid="00281011"/>
    </style:style>
    <style:style style:name="P13" style:family="paragraph" style:parent-style-name="Standard">
      <style:text-properties officeooo:rsid="001ca5ce" officeooo:paragraph-rsid="00281011"/>
    </style:style>
    <style:style style:name="P14" style:family="paragraph" style:parent-style-name="Standard">
      <style:text-properties officeooo:rsid="00210b9e" officeooo:paragraph-rsid="00281011"/>
    </style:style>
    <style:style style:name="P15" style:family="paragraph" style:parent-style-name="Standard">
      <style:text-properties officeooo:rsid="001d51d5" officeooo:paragraph-rsid="00281011"/>
    </style:style>
    <style:style style:name="P16" style:family="paragraph" style:parent-style-name="Standard">
      <style:text-properties officeooo:rsid="001f28ae" officeooo:paragraph-rsid="00281011"/>
    </style:style>
    <style:style style:name="P17" style:family="paragraph" style:parent-style-name="Standard">
      <style:paragraph-properties fo:break-before="page"/>
      <style:text-properties officeooo:rsid="001f28ae" officeooo:paragraph-rsid="00281011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93649" officeooo:paragraph-rsid="00293649" style:font-weight-asian="bold" style:font-weight-complex="bold"/>
    </style:style>
    <style:style style:name="P19" style:family="paragraph" style:parent-style-name="Standard">
      <style:text-properties officeooo:rsid="00293649" officeooo:paragraph-rsid="00310b69"/>
    </style:style>
    <style:style style:name="P20" style:family="paragraph" style:parent-style-name="Standard">
      <style:text-properties officeooo:rsid="00293649" officeooo:paragraph-rsid="00293649"/>
    </style:style>
    <style:style style:name="P21" style:family="paragraph" style:parent-style-name="Standard">
      <style:text-properties officeooo:rsid="002a452e" officeooo:paragraph-rsid="002a452e"/>
    </style:style>
    <style:style style:name="P22" style:family="paragraph" style:parent-style-name="Standard">
      <style:text-properties fo:language="en" fo:country="US" style:text-underline-style="solid" style:text-underline-width="auto" style:text-underline-color="font-color" fo:font-weight="bold" officeooo:rsid="0032f73c" officeooo:paragraph-rsid="0032f73c" style:font-weight-asian="bold" style:font-weight-complex="bold"/>
    </style:style>
    <style:style style:name="P23" style:family="paragraph" style:parent-style-name="Standard">
      <style:text-properties fo:language="en" fo:country="US" officeooo:rsid="0032f73c" officeooo:paragraph-rsid="0032f73c"/>
    </style:style>
    <style:style style:name="P24" style:family="paragraph" style:parent-style-name="Standard">
      <style:text-properties fo:language="en" fo:country="US" officeooo:rsid="0032f73c" officeooo:paragraph-rsid="0034e8bb"/>
    </style:style>
    <style:style style:name="T1" style:family="text">
      <style:text-properties officeooo:rsid="00173863"/>
    </style:style>
    <style:style style:name="T2" style:family="text">
      <style:text-properties officeooo:rsid="0026ef12"/>
    </style:style>
    <style:style style:name="T3" style:family="text">
      <style:text-properties officeooo:rsid="0016dbc9"/>
    </style:style>
    <style:style style:name="T4" style:family="text">
      <style:text-properties officeooo:rsid="002520bf"/>
    </style:style>
    <style:style style:name="T5" style:family="text">
      <style:text-properties officeooo:rsid="0024a90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62b3"/>
    </style:style>
    <style:style style:name="T8" style:family="text">
      <style:text-properties officeooo:rsid="001d51d5"/>
    </style:style>
    <style:style style:name="T9" style:family="text">
      <style:text-properties officeooo:rsid="00210b9e"/>
    </style:style>
    <style:style style:name="T10" style:family="text">
      <style:text-properties officeooo:rsid="002dba27"/>
    </style:style>
    <style:style style:name="T11" style:family="text">
      <style:text-properties officeooo:rsid="002a452e"/>
    </style:style>
    <style:style style:name="T12" style:family="text">
      <style:text-properties officeooo:rsid="00310b69"/>
    </style:style>
    <style:style style:name="T13" style:family="text">
      <style:text-properties officeooo:rsid="00361d6a"/>
    </style:style>
    <style:style style:name="T14" style:family="text">
      <style:text-properties officeooo:rsid="0034e8bb"/>
    </style:style>
    <style:style style:name="T15" style:family="text">
      <style:text-properties officeooo:rsid="00369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ck</text:p>
      <text:p text:style-name="P1">Problems and Solutions</text:p>
      <text:p text:style-name="Standard"/>
      <text:p text:style-name="P2">UNSOLVED:</text:p>
      <text:p text:style-name="Standard"/>
      <text:p text:style-name="Standard">new problem</text:p>
      <text:p text:style-name="Standard">I added 2 animations, one to display when the alarm goes off.</text:p>
      <text:p text:style-name="Standard">But when I attempt to turn the alarm off, the alarm gives a long beep like it froze up.</text:p>
      <text:p text:style-name="Standard"/>
      <text:p text:style-name="Standard">Swapping the order between isAlarmRinging and loadAnimation didn't work.</text:p>
      <text:p text:style-name="P3">Removing loadanimation removes the issue. But I need change the animation when the alarm stops ringing.</text:p>
      <text:p text:style-name="Standard"/>
      <text:p text:style-name="Standard"/>
      <text:p text:style-name="Standard"/>
      <text:p text:style-name="Standard">Another issue is that the alarm <text:span text:style-name="T1">tune</text:span> "blocks" other code from running. So the alarm animation doesn't update often enough.</text:p>
      <text:p text:style-name="Standard"/>
      <text:p text:style-name="Standard"/>
      <text:p text:style-name="P4"/>
      <text:p text:style-name="P5"/>
      <text:p text:style-name="P6">LCD screen is dim <text:span text:style-name="T2">or not displaying anything</text:span>.</text:p>
      <text:p text:style-name="P6">I believe this is a connection issue.</text:p>
      <text:p text:style-name="P6"><text:span text:style-name="T2">S</text:span>oldering should fix it.</text:p>
      <text:p text:style-name="P5"/>
      <text:p text:style-name="P5"/>
      <text:p text:style-name="P7"/>
      <text:p text:style-name="P2">SOLVED:</text:p>
      <text:p text:style-name="P8"/>
      <text:p text:style-name="P9">LCD screen</text:p>
      <text:p text:style-name="P10"/>
      <text:p text:style-name="P10"><text:span text:style-name="T3">Setting up the tft screen and getting it working </text:span><text:span text:style-name="T4">was difficult</text:span><text:span text:style-name="T3">.</text:span></text:p>
      <text:p text:style-name="P11">I wired up the lcd screen but it didn’t work.</text:p>
      <text:p text:style-name="P10"/>
      <text:p text:style-name="P11">I found this one video about wiring up the lcd screen. Their hardware was slightly different from mine so I paid close attention to everything. <text:span text:style-name="T5">A</text:span>nd found out my drivers were not configured <text:span text:style-name="T5">to work with my hardware</text:span>.</text:p>
      <text:p text:style-name="P10"/>
      <text:p text:style-name="P11"><text:span text:style-name="T6">Problem:</text:span> LCD Screen not working.</text:p>
      <text:p text:style-name="P11"><text:span text:style-name="T6">Cause:</text:span> LCD screen driver was not configured correctly.</text:p>
      <text:p text:style-name="P11"><text:span text:style-name="T6">Fix:</text:span> Configured the driver to work for my hardware.</text:p>
      <text:p text:style-name="P8"/>
      <text:p text:style-name="P8"/>
      <text:p text:style-name="P9">Animation</text:p>
      <text:p text:style-name="P12">Playing an animation “blocks” the clock from updating.</text:p>
      <text:p text:style-name="P12">I solved this by rewriting the displayImage to only display 1 frame of the animation. Then update it every 100ms.</text:p>
      <text:p text:style-name="P8"/>
      <text:p text:style-name="P5"/>
      <text:p text:style-name="P9">SD Card</text:p>
      <text:p text:style-name="P13">Wiring up an SD module was surprisingly difficult.</text:p>
      <text:p text:style-name="P13"/>
      <text:p text:style-name="P13"><text:span text:style-name="T7">To solve this problem </text:span>I:</text:p>
      <text:p text:style-name="P13"><text:span text:style-name="T7">Ra</text:span>n the code through a simulator. It worked as expected.</text:p>
      <text:p text:style-name="P13">Verif<text:span text:style-name="T7">ied</text:span> my wiring several times</text:p>
      <text:p text:style-name="P13">Swapped every part and wire to ensure <text:span text:style-name="T8">I wasn’t using a defective part</text:span>.</text:p>
      <text:p text:style-name="P14">Asked for help on a the Arduino community discord.</text:p>
      <text:p text:style-name="P13"/>
      <text:p text:style-name="P14">None of those solved the problem.</text:p>
      <text:p text:style-name="P13"/>
      <text:p text:style-name="P15"><text:span text:style-name="T6">Problem:</text:span> SD module wouldn’t work.</text:p>
      <text:p text:style-name="P15"><text:span text:style-name="T6">Cause:</text:span> Using pin 5 for chip select. 5 doesn’t work reliably because it’s a strapping pin, used when booting up the micro controller.</text:p>
      <text:p text:style-name="P15"><text:span text:style-name="T6">Fix:</text:span> Use a different (non strapping) pin, like pin 13 <text:span text:style-name="T9">for the chip select</text:span>.</text:p>
      <text:p text:style-name="P16"/>
      <text:p text:style-name="P16">What made this difficult to diagnose, is that pin 5 is the default/standard pin for chip select. <text:span text:style-name="T9">So it should work. </text:span><text:span text:style-name="T10">And it does work for some components. But not for the SD card module.</text:span></text:p>
      <text:p text:style-name="P16"/>
      <text:p text:style-name="P16"/>
      <text:p text:style-name="P17"/>
      <text:p text:style-name="P18">SD Wiring</text:p>
      <text:p text:style-name="P16"/>
      <text:p text:style-name="P19">I wired up a SD card module to an esp32 and it works. Then I tried adding an SD card to my existing project but it wouldn’t work for some reason. I checked <text:span text:style-name="T11">my</text:span> wiring and disconnected all other components. <text:span text:style-name="T12">It s</text:span><text:span text:style-name="T11">till didn’t work. </text:span><text:span text:style-name="T12">After some testing, I found the issue was a faulty breadboard rail.</text:span></text:p>
      <text:p text:style-name="P19"/>
      <text:p text:style-name="P20"/>
      <text:p text:style-name="P21"><text:span text:style-name="T6">Problem:</text:span> SD module isn’t working.</text:p>
      <text:p text:style-name="P21"><text:span text:style-name="T6">Cause:</text:span> Faulty breadboard rail</text:p>
      <text:p text:style-name="P21"><text:span text:style-name="T6">Fix:</text:span> Use a different section of the breadboard or a different breadboard.</text:p>
      <text:p text:style-name="P16"/>
      <text:p text:style-name="P16"/>
      <text:p text:style-name="P16"/>
      <text:p text:style-name="P22">Image<text:span text:style-name="T13">s</text:span> Won’t Display</text:p>
      <text:p text:style-name="P23"/>
      <text:p text:style-name="P23"><text:span text:style-name="T13">Originally, </text:span>I <text:span text:style-name="T14">did have image display working using code examples from the ‘TFT eSPI’ and PNGdec libraries. </text:span><text:span text:style-name="T13">Sometime later the images stopped being displayed even though my code hasn’t changed.</text:span></text:p>
      <text:p text:style-name="P23"/>
      <text:p text:style-name="P23">To troubleshoot this, I opened the ‘sdcard_slideshow’ example from the <text:span text:style-name="T14">PNGd</text:span>ec library. <text:span text:style-name="T13">Changed the bare minimum </text:span><text:span text:style-name="T15">code</text:span><text:span text:style-name="T13"> so that it</text:span> work<text:span text:style-name="T13">s</text:span> with my hardware. Looked for any differences between this example and my project code. <text:span text:style-name="T13">I removed 2 lines from my project code that weren’t in the example and this fixed the problem. The images are now displayed.</text:span></text:p>
      <text:p text:style-name="P23"/>
      <text:p text:style-name="P23"/>
      <text:p text:style-name="P23"><text:span text:style-name="T6">Problem:</text:span> Images won’t display on screen</text:p>
      <text:p text:style-name="P24"><text:span text:style-name="T6">Cause:</text:span> Turns out the issue was caused by an update to the <text:span text:style-name="T14">‘TFT eSPI’</text:span> library.</text:p>
      <text:p text:style-name="P23"><text:span text:style-name="T6">Fix:</text:span> Removing ‘tft.startWrite()’ and ‘tft.endWrite()’ from my code fixed the issue.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0:39:16.614005300</meta:creation-date>
    <dc:date>2026-05-18T14:21:17.907596600</dc:date>
    <meta:editing-duration>P11DT11H7M36S</meta:editing-duration>
    <meta:editing-cycles>21</meta:editing-cycles>
    <meta:generator>LibreOffice/25.8.6.2$Windows_X86_64 LibreOffice_project/b4b39682cd9868fa725bc664aff94278d315bd04</meta:generator>
    <meta:document-statistic meta:table-count="0" meta:image-count="0" meta:object-count="0" meta:page-count="3" meta:paragraph-count="46" meta:word-count="552" meta:character-count="3190" meta:non-whitespace-character-count="2684"/>
  </office:meta>
</office:document-meta>
</file>